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BCC50000414E00000F2386B15A92.svg" manifest:media-type="image/svg+xml"/>
  <manifest:file-entry manifest:full-path="Pictures/10000001000003B4000000DC58E181AE.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Table1" style:family="table">
      <style:table-properties style:width="6.2694in" fo:margin-top="0in" fo:margin-bottom="0in" table:align="center" style:writing-mode="page"/>
    </style:style>
    <style:style style:name="Table1.A" style:family="table-column">
      <style:table-column-properties style:column-width="3.1347in"/>
    </style:style>
    <style:style style:name="Table1.1" style:family="table-row">
      <style:table-row-properties fo:keep-together="always"/>
    </style:style>
    <style:style style:name="Table1.A1" style:family="table-cell">
      <style:table-cell-properties fo:background-color="#c59b27" fo:padding-left="0.075in" fo:padding-right="0.075in" fo:padding-top="0in" fo:padding-bottom="0in" fo:border="none">
        <style:background-image/>
      </style:table-cell-properties>
    </style:style>
    <style:style style:name="Table1.A2" style:family="table-cell">
      <style:table-cell-properties fo:background-color="#ffffff" fo:padding-left="0.075in" fo:padding-right="0.075in" fo:padding-top="0in" fo:padding-bottom="0in" fo:border-left="none" fo:border-right="none" fo:border-top="none" fo:border-bottom="0.75pt solid #efe6d0">
        <style:background-image/>
      </style:table-cell-properties>
    </style:style>
    <style:style style:name="Table1.A3" style:family="table-cell">
      <style:table-cell-properties fo:background-color="#fffbf2" fo:padding-left="0.075in" fo:padding-right="0.075in" fo:padding-top="0in" fo:padding-bottom="0in" fo:border-left="none" fo:border-right="none" fo:border-top="none" fo:border-bottom="0.75pt solid #efe6d0">
        <style:background-image/>
      </style:table-cell-properties>
    </style:style>
    <style:style style:name="Table2" style:family="table">
      <style:table-properties style:width="6.2694in" fo:margin-top="0in" fo:margin-bottom="0in" table:align="center" style:writing-mode="page"/>
    </style:style>
    <style:style style:name="Table2.A" style:family="table-column">
      <style:table-column-properties style:column-width="3.1347in"/>
    </style:style>
    <style:style style:name="Table2.1" style:family="table-row">
      <style:table-row-properties fo:keep-together="always"/>
    </style:style>
    <style:style style:name="Table2.A1" style:family="table-cell">
      <style:table-cell-properties fo:background-color="#c59b27" fo:padding-left="0.075in" fo:padding-right="0.075in" fo:padding-top="0in" fo:padding-bottom="0in" fo:border="none">
        <style:background-image/>
      </style:table-cell-properties>
    </style:style>
    <style:style style:name="Table2.A2" style:family="table-cell">
      <style:table-cell-properties fo:background-color="#ffffff" fo:padding-left="0.075in" fo:padding-right="0.075in" fo:padding-top="0in" fo:padding-bottom="0in" fo:border-left="none" fo:border-right="none" fo:border-top="none" fo:border-bottom="0.75pt solid #efe6d0">
        <style:background-image/>
      </style:table-cell-properties>
    </style:style>
    <style:style style:name="Table2.A3" style:family="table-cell">
      <style:table-cell-properties fo:background-color="#fffbf2" fo:padding-left="0.075in" fo:padding-right="0.075in" fo:padding-top="0in" fo:padding-bottom="0in" fo:border-left="none" fo:border-right="none" fo:border-top="none" fo:border-bottom="0.75pt solid #efe6d0">
        <style:background-image/>
      </style:table-cell-properties>
    </style:style>
    <style:style style:name="P1" style:family="paragraph" style:parent-style-name="Standard">
      <style:paragraph-properties fo:text-align="center" style:justify-single-word="false"/>
      <style:text-properties officeooo:paragraph-rsid="0007bd8b"/>
    </style:style>
    <style:style style:name="P2" style:family="paragraph" style:parent-style-name="Standard">
      <style:text-properties officeooo:paragraph-rsid="0007bd8b"/>
    </style:style>
    <style:style style:name="P3" style:family="paragraph" style:parent-style-name="Standard">
      <style:paragraph-properties fo:margin-top="0in" fo:margin-bottom="0.1665in" style:contextual-spacing="false" fo:line-height="115%"/>
    </style:style>
    <style:style style:name="P4" style:family="paragraph" style:parent-style-name="Heading_20_2">
      <style:paragraph-properties fo:margin-top="0.1945in" fo:margin-bottom="0.0835in" style:contextual-spacing="false" fo:keep-with-next="always"/>
      <style:text-properties fo:color="#8c690f" loext:opacity="100%" style:font-name="Arial" fo:font-weight="bold" style:font-weight-asian="bold"/>
    </style:style>
    <style:style style:name="P5" style:family="paragraph" style:parent-style-name="Standard">
      <style:paragraph-properties fo:margin-left="0.0555in" fo:margin-top="0.0835in" fo:margin-bottom="0.0835in" style:contextual-spacing="false"/>
      <style:text-properties fo:color="#ffffff" loext:opacity="100%" style:font-name="Arial" fo:font-size="10pt" fo:font-weight="bold" style:font-size-asian="10pt" style:font-weight-asian="bold"/>
    </style:style>
    <style:style style:name="P6" style:family="paragraph" style:parent-style-name="Standard">
      <style:paragraph-properties fo:margin-left="0.0555in" fo:margin-top="0.0835in" fo:margin-bottom="0.0835in" style:contextual-spacing="false"/>
      <style:text-properties style:font-name="Arial" fo:font-size="10pt" style:font-size-asian="10pt"/>
    </style:style>
    <style:style style:name="P7" style:family="paragraph" style:parent-style-name="Standard">
      <style:paragraph-properties fo:margin-top="0in" fo:margin-bottom="0.1665in" style:contextual-spacing="false"/>
    </style:style>
    <style:style style:name="P8" style:family="paragraph" style:parent-style-name="Heading_20_1">
      <style:paragraph-properties fo:margin-top="0.222in" fo:margin-bottom="0.111in" style:contextual-spacing="false" fo:keep-with-next="always"/>
      <style:text-properties fo:color="#c59b27" loext:opacity="100%" style:font-name="Arial" fo:font-weight="bold" style:font-weight-asian="bold"/>
    </style:style>
    <style:style style:name="P9" style:family="paragraph" style:parent-style-name="Heading_20_3">
      <style:paragraph-properties fo:margin-top="0.139in" fo:margin-bottom="0.0555in" style:contextual-spacing="false" fo:keep-with-next="always"/>
      <style:text-properties fo:color="#8c690f" loext:opacity="100%" style:font-name="Arial" fo:font-weight="bold" style:font-weight-asian="bold"/>
    </style:style>
    <style:style style:name="P10" style:family="paragraph" style:parent-style-name="List_20_1" style:list-style-name="WWNum1">
      <style:paragraph-properties fo:margin-top="0in" fo:margin-bottom="0.0417in" style:contextual-spacing="true"/>
      <style:text-properties style:font-name="Arial"/>
    </style:style>
    <style:style style:name="P11" style:family="paragraph" style:parent-style-name="Heading_20_3">
      <style:paragraph-properties fo:margin-top="0.1665in" fo:margin-bottom="0.0555in" style:contextual-spacing="false" fo:keep-with-next="always"/>
      <style:text-properties fo:color="#8c690f" loext:opacity="100%" style:font-name="Arial" fo:font-weight="bold" style:font-weight-asian="bold"/>
    </style:style>
    <style:style style:name="P12" style:family="paragraph" style:parent-style-name="List_20_1" style:list-style-name="WWNum1">
      <style:paragraph-properties fo:margin-top="0in" fo:margin-bottom="0.0555in" style:contextual-spacing="true"/>
    </style:style>
    <style:style style:name="P13" style:family="paragraph" style:parent-style-name="Standard">
      <style:paragraph-properties fo:margin-left="0.25in" fo:margin-top="0in" fo:margin-bottom="0.0835in" style:contextual-spacing="false" fo:text-indent="-0.25in" style:auto-text-indent="false"/>
    </style:style>
    <style:style style:name="P14" style:family="paragraph" style:parent-style-name="Standard">
      <style:paragraph-properties fo:text-align="center" style:justify-single-word="false" fo:break-before="page"/>
      <style:text-properties fo:color="#8c690f" loext:opacity="100%" fo:font-size="24pt" fo:font-weight="bold" officeooo:paragraph-rsid="0007bd8b" style:font-size-asian="24pt" style:font-weight-asian="bold"/>
    </style:style>
    <style:style style:name="P15" style:family="paragraph" style:parent-style-name="Standard">
      <style:paragraph-properties fo:text-align="center" style:justify-single-word="false"/>
      <style:text-properties fo:color="#646464" loext:opacity="100%" fo:font-weight="bold" officeooo:paragraph-rsid="0007bd8b" style:font-weight-asian="bold" style:font-size-complex="11pt"/>
    </style:style>
    <style:style style:name="P16" style:family="paragraph" style:parent-style-name="Standard">
      <style:text-properties fo:color="#698a64" loext:opacity="100%" fo:font-size="16pt" fo:font-weight="bold" officeooo:paragraph-rsid="0007bd8b" style:font-size-asian="16pt" style:font-weight-asian="bold"/>
    </style:style>
    <style:style style:name="T1" style:family="text">
      <style:text-properties fo:font-size="24pt" fo:font-weight="bold" style:font-size-asian="24pt" style:font-weight-asian="bold"/>
    </style:style>
    <style:style style:name="T2" style:family="text">
      <style:text-properties fo:color="#8c690f" loext:opacity="100%" style:font-name="Arial" fo:font-size="24pt" fo:font-weight="bold" style:font-size-asian="24pt" style:font-weight-asian="bold"/>
    </style:style>
    <style:style style:name="T3" style:family="text">
      <style:text-properties fo:color="#646464" loext:opacity="100%" style:font-name="Arial" fo:font-size="11pt" fo:font-weight="bold" style:font-size-asian="11pt" style:font-weight-asian="bold" style:font-size-complex="11pt"/>
    </style:style>
    <style:style style:name="T4" style:family="text">
      <style:text-properties fo:color="#698a64" loext:opacity="100%"/>
    </style:style>
    <style:style style:name="T5" style:family="text">
      <style:text-properties fo:color="#698a64" loext:opacity="100%" style:font-name="Arial" fo:font-size="16pt" fo:font-weight="bold" style:font-size-asian="16pt" style:font-weight-asian="bold"/>
    </style:style>
    <style:style style:name="T6" style:family="text">
      <style:text-properties style:font-name="Arial" fo:font-weight="bold" style:font-weight-asian="bold"/>
    </style:style>
    <style:style style:name="T7" style:family="text">
      <style:text-properties style:font-name="Arial"/>
    </style:style>
    <style:style style:name="T8" style:family="text">
      <style:text-properties style:font-name="Arial" officeooo:rsid="001c7868"/>
    </style:style>
    <style:style style:name="T9" style:family="text">
      <style:text-properties style:font-name="Arial" officeooo:rsid="0017e3ef"/>
    </style:style>
    <style:style style:name="fr1" style:family="graphic" style:parent-style-name="Graphics">
      <style:graphic-properties fo:margin-left="0in" fo:margin-right="0in" fo:margin-top="0in" fo:margin-bottom="0in" style:vertical-pos="top" style:vertical-rel="baseline"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loext:decorative="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draw:frame draw:style-name="fr1" draw:name="Graphic 1" text:anchor-type="as-char" svg:width="1.4937in" svg:height="0.3453in" draw:z-index="0"><draw:image xlink:href="Pictures/1000BCC50000414E00000F2386B15A92.svg" xlink:type="simple" xlink:show="embed" xlink:actuate="onLoad" draw:mime-type="image/svg+xml"/><draw:image xlink:href="Pictures/10000001000003B4000000DC58E181AE.png" xlink:type="simple" xlink:show="embed" xlink:actuate="onLoad" draw:mime-type="image/png"/></draw:frame></text:p>
      <text:p text:style-name="P1"><text:span text:style-name="T2">TRAILBLAZER<text:line-break/></text:span><text:span text:style-name="T3">User Manual &amp; Installation Guide</text:span></text:p>
      <text:p text:style-name="P1">_____________________________________</text:p>
      <text:p text:style-name="P2" loext:marker-style-name="T4"><text:span text:style-name="T5">Thank You for Your Adventure</text:span></text:p>
      <text:p text:style-name="P3">Congratulations on your acquisition of the Trailblazer. This piece is more than art; it is a physical record of your effort. Each contour represents the grit, altitude, and beauty of your journey. Hand-crafted with precision, your sculpture and botanical art are designed to last a lifetime.</text:p>
      <text:h text:style-name="P4" text:outline-level="2">What’s in the Box</text:h>
      <table:table table:name="Table1" table:style-name="Table1">
        <table:table-column table:style-name="Table1.A" table:number-columns-repeated="2"/>
        <table:table-header-rows>
          <table:table-row table:style-name="Table1.1">
            <table:table-cell table:style-name="Table1.A1" office:value-type="string">
              <text:p text:style-name="P5">Qty</text:p>
            </table:table-cell>
            <table:table-cell table:style-name="Table1.A1" office:value-type="string">
              <text:p text:style-name="P5">Item Description</text:p>
            </table:table-cell>
          </table:table-row>
        </table:table-header-rows>
        <table:table-row table:style-name="Table1.1">
          <table:table-cell table:style-name="Table1.A2" office:value-type="string">
            <text:p text:style-name="P6">3x</text:p>
          </table:table-cell>
          <table:table-cell table:style-name="Table1.A2" office:value-type="string">
            <text:p text:style-name="P6">Topographical Sculptures (3-Piece Collage)</text:p>
          </table:table-cell>
        </table:table-row>
        <table:table-row table:style-name="Table1.1">
          <table:table-cell table:style-name="Table1.A3" office:value-type="string">
            <text:p text:style-name="P6">1x</text:p>
          </table:table-cell>
          <table:table-cell table:style-name="Table1.A3" office:value-type="string">
            <text:p text:style-name="P6">Botanical Art Insert (Preserved, no need to water)</text:p>
          </table:table-cell>
        </table:table-row>
        <table:table-row table:style-name="Table1.1">
          <table:table-cell table:style-name="Table1.A2" office:value-type="string">
            <text:p text:style-name="P6">1x</text:p>
          </table:table-cell>
          <table:table-cell table:style-name="Table1.A2" office:value-type="string">
            <text:p text:style-name="P6">Premium Picture Frame</text:p>
          </table:table-cell>
        </table:table-row>
        <table:table-row table:style-name="Table1.1">
          <table:table-cell table:style-name="Table1.A3" office:value-type="string">
            <text:p text:style-name="P6">2x</text:p>
          </table:table-cell>
          <table:table-cell table:style-name="Table1.A3" office:value-type="string">
            <text:p text:style-name="P6">Mounting Clips</text:p>
          </table:table-cell>
        </table:table-row>
        <table:table-row table:style-name="Table1.1">
          <table:table-cell table:style-name="Table1.A2" office:value-type="string">
            <text:p text:style-name="P6">4x</text:p>
          </table:table-cell>
          <table:table-cell table:style-name="Table1.A2" office:value-type="string">
            <text:p text:style-name="P6">Straight Brackets (For enhanced security/stability)</text:p>
          </table:table-cell>
        </table:table-row>
        <table:table-row table:style-name="Table1.1">
          <table:table-cell table:style-name="Table1.A3" office:value-type="string">
            <text:p text:style-name="P6">1x</text:p>
          </table:table-cell>
          <table:table-cell table:style-name="Table1.A3" office:value-type="string">
            <text:p text:style-name="P6">Flush Mount Set (Includes short screws, long screws, and wall anchors)</text:p>
          </table:table-cell>
        </table:table-row>
        <table:table-row table:style-name="Table1.1">
          <table:table-cell table:style-name="Table1.A2" office:value-type="string">
            <text:p text:style-name="P6">1x</text:p>
          </table:table-cell>
          <table:table-cell table:style-name="Table1.A2" office:value-type="string">
            <text:p text:style-name="P6">Alignment Stencil (Instructional Template)</text:p>
          </table:table-cell>
        </table:table-row>
      </table:table>
      <text:p text:style-name="P7"/>
      <text:h text:style-name="P8" text:outline-level="1">Mounting &amp; Installation</text:h>
      <text:h text:style-name="P9" text:outline-level="3">Tools Required:</text:h>
      <text:list text:style-name="WWNum1">
        <text:list-item>
          <text:p text:style-name="P10">Scotch tape</text:p>
        </text:list-item>
        <text:list-item>
          <text:p text:style-name="P10">Bubble leveler</text:p>
        </text:list-item>
        <text:list-item>
          <text:p text:style-name="P10">Power drill</text:p>
        </text:list-item>
        <text:list-item>
          <text:p text:style-name="P10">Phillips screwdriver</text:p>
        </text:list-item>
      </text:list>
      <text:h text:style-name="P11" text:outline-level="3">Important Guidelines Before You Start:</text:h>
      <text:list text:continue-numbering="true" text:style-name="WWNum1">
        <text:list-item>
          <text:p text:style-name="P12"><text:span text:style-name="T6">Orientation Guard: </text:span><text:span text:style-name="T7">Every frame features the Blazing Goat logo engraved on its southeast edge. When you are arranging, connecting, or rearranging the layout, ensure </text:span><text:soft-page-break/><text:span text:style-name="T7">that this logo remains positioned on the southeast side. This is vital to keep the topographical orientation completely accurate.</text:span></text:p>
        </text:list-item>
        <text:list-item>
          <text:p text:style-name="P12"><text:span text:style-name="T6">The Modular System: </text:span><text:span text:style-name="T7">At least two pieces of the art collage must be physically hung/drilled into the wall for foundational stability. The remaining piece can be effortlessly attached and mounted around them using the built-in Magnetic Modular System (MMS).</text:span></text:p>
        </text:list-item>
        <text:list-item>
          <text:p text:style-name="P12"><text:span text:style-name="T6">Choosing Your Layout: </text:span><text:span text:style-name="T7">You can choose whichever two (or </text:span><text:span text:style-name="T8">more</text:span><text:span text:style-name="T7">) pieces you want to physically hang from your arrangement.</text:span></text:p>
        </text:list-item>
        <text:list-item>
          <text:p text:style-name="P12"><text:span text:style-name="T6">Optional Bracket Security: </text:span><text:span text:style-name="T7">If you want to make your system more secure, you can use the included straight brackets to lock adjacent art pieces together. Use two brackets for each pair of touching pieces to structurally reinforce the connection. </text:span><text:span text:style-name="T9">The drilled holes are provided in the back of the art.</text:span></text:p>
        </text:list-item>
      </text:list>
      <text:h text:style-name="P11" text:outline-level="3">Step-by-Step Instructions:</text:h>
      <text:p text:style-name="P13"><text:span text:style-name="T6">1. <text:s/>Plan and Level: </text:span><text:span text:style-name="T7">Place the alignment stencil on the wall in your desired location. Use a bubble leveler to ensure it is completely straight.</text:span></text:p>
      <text:p text:style-name="P13"><text:span text:style-name="T6">2. <text:s/>Preview Layout: </text:span><text:span text:style-name="T7">Temporarily position your Blaze Art against the stencil to verify that the combination and layout look exactly how you want them. Double-check that every single frame has its logo on the southeast edge so the landscape is aligned correctly.</text:span></text:p>
      <text:p text:style-name="P13"><text:span text:style-name="T6">3. <text:s/>Secure the Stencil: </text:span><text:span text:style-name="T7">Once you are satisfied with the arrangement, secure the stencil to the wall using scotch tape. This template marks the exact outlines where your drill holes will go.</text:span></text:p>
      <text:p text:style-name="P13"><text:span text:style-name="T6">4. <text:s/>Attach Flush Mounts to Art: </text:span><text:span text:style-name="T7">Decide which pieces you are going to physically hang. Take the smaller screws and use your Phillips screwdriver to securely attach the flush mount hardware directly into the back of those chosen art pieces. (Warning: Do not use long screws on the art pieces, as they will cause damage).</text:span></text:p>
      <text:p text:style-name="P13"><text:span text:style-name="T6">5. <text:s/>Prepare the Wall Anchors: </text:span><text:span text:style-name="T7">Locate the drilling marks on your taped stencil for your hung pieces. Using your power drill, drill holes into the marked wall locations. Insert the plastic wall anchors into the newly drilled holes. If necessary, tap them gently until they sit completely flush with the drywall surface.</text:span></text:p>
      <text:p text:style-name="P13"><text:span text:style-name="T6">6. <text:s/>Mount to the Wall: </text:span><text:span text:style-name="T7">Align the longer screws with the installed wall anchors and drive them in using your Phillips screwdriver, leaving just enough of the screw head exposed to catch the flush mount. Hang your primary pieces securely onto these screws.</text:span></text:p>
      <text:p text:style-name="P13"><text:span text:style-name="T6">7. <text:s/>Complete the Collage: </text:span><text:span text:style-name="T7">Connect the remaining art piece around your anchored pieces using the Magnetic Modular System (MMS), ensuring all frames maintain the correct logo orientation. If you chose to use the optional straight brackets for extra safety, lock the adjacent pairs together now before final mounting. Double-check the entire system for stability.</text:span></text:p>
      <text:p text:style-name="Standard"/>
      <text:p text:style-name="P14">TRAILBLAZER</text:p>
      <text:p text:style-name="P15">Manual de Usuario y Guía de Instalación</text:p>
      <text:p text:style-name="P16">Gracias por su Aventura</text:p>
      <text:p text:style-name="P3">Felicitaciones por la adquisición del Trailblazer. Esta pieza es más que arte; es un registro físico de su esfuerzo. Cada contorno representa el coraje, la altitud y la belleza de su viaje. Elaboradas a mano con precisión, su escultura y arte botánico están diseñados para durar toda la vida.</text:p>
      <text:h text:style-name="P4" text:outline-level="2">Contenido de la Caja</text:h>
      <table:table table:name="Table2" table:style-name="Table2">
        <table:table-column table:style-name="Table2.A" table:number-columns-repeated="2"/>
        <table:table-header-rows>
          <table:table-row table:style-name="Table2.1">
            <table:table-cell table:style-name="Table2.A1" office:value-type="string">
              <text:p text:style-name="P5">Cant.</text:p>
            </table:table-cell>
            <table:table-cell table:style-name="Table2.A1" office:value-type="string">
              <text:p text:style-name="P5">Descripción del Artículo</text:p>
            </table:table-cell>
          </table:table-row>
        </table:table-header-rows>
        <table:table-row table:style-name="Table2.1">
          <table:table-cell table:style-name="Table2.A2" office:value-type="string">
            <text:p text:style-name="P6">3x</text:p>
          </table:table-cell>
          <table:table-cell table:style-name="Table2.A2" office:value-type="string">
            <text:p text:style-name="P6">Esculturas Topográficas (Composición de 3 Piezas)</text:p>
          </table:table-cell>
        </table:table-row>
        <table:table-row table:style-name="Table2.1">
          <table:table-cell table:style-name="Table2.A3" office:value-type="string">
            <text:p text:style-name="P6">1x</text:p>
          </table:table-cell>
          <table:table-cell table:style-name="Table2.A3" office:value-type="string">
            <text:p text:style-name="P6">Inserto de Arte Botánico (Preservado, no necesita riego)</text:p>
          </table:table-cell>
        </table:table-row>
        <table:table-row table:style-name="Table2.1">
          <table:table-cell table:style-name="Table2.A2" office:value-type="string">
            <text:p text:style-name="P6">1x</text:p>
          </table:table-cell>
          <table:table-cell table:style-name="Table2.A2" office:value-type="string">
            <text:p text:style-name="P6">Marco de Fotos Premium</text:p>
          </table:table-cell>
        </table:table-row>
        <table:table-row table:style-name="Table2.1">
          <table:table-cell table:style-name="Table2.A3" office:value-type="string">
            <text:p text:style-name="P6">2x</text:p>
          </table:table-cell>
          <table:table-cell table:style-name="Table2.A3" office:value-type="string">
            <text:p text:style-name="P6">Clips de Montaje</text:p>
          </table:table-cell>
        </table:table-row>
        <table:table-row table:style-name="Table2.1">
          <table:table-cell table:style-name="Table2.A2" office:value-type="string">
            <text:p text:style-name="P6">4x</text:p>
          </table:table-cell>
          <table:table-cell table:style-name="Table2.A2" office:value-type="string">
            <text:p text:style-name="P6">Soportes Rectos (Para mayor seguridad/estabilidad)</text:p>
          </table:table-cell>
        </table:table-row>
        <table:table-row table:style-name="Table2.1">
          <table:table-cell table:style-name="Table2.A3" office:value-type="string">
            <text:p text:style-name="P6">1x</text:p>
          </table:table-cell>
          <table:table-cell table:style-name="Table2.A3" office:value-type="string">
            <text:p text:style-name="P6">Juego de Montaje Al Ras (Incluye tornillos cortos, tornillos largos y anclajes para pared)</text:p>
          </table:table-cell>
        </table:table-row>
        <table:table-row table:style-name="Table2.1">
          <table:table-cell table:style-name="Table2.A2" office:value-type="string">
            <text:p text:style-name="P6">1x</text:p>
          </table:table-cell>
          <table:table-cell table:style-name="Table2.A2" office:value-type="string">
            <text:p text:style-name="P6">Plantilla de Alineación (Plantilla de Instrucciones)</text:p>
          </table:table-cell>
        </table:table-row>
      </table:table>
      <text:p text:style-name="P7"/>
      <text:h text:style-name="P8" text:outline-level="1">Montaje e Instalación</text:h>
      <text:h text:style-name="P9" text:outline-level="3">Herramientas Necesarias:</text:h>
      <text:list text:continue-numbering="true" text:style-name="WWNum1">
        <text:list-item>
          <text:p text:style-name="P10">Cinta adhesiva (Scotch)</text:p>
        </text:list-item>
        <text:list-item>
          <text:p text:style-name="P10">Nivel de burbuja</text:p>
        </text:list-item>
        <text:list-item>
          <text:p text:style-name="P10">Taladro eléctrico</text:p>
        </text:list-item>
        <text:list-item>
          <text:p text:style-name="P10">Destornillador Phillips (estrella)</text:p>
        </text:list-item>
      </text:list>
      <text:h text:style-name="P11" text:outline-level="3">Pautas Importantes Antes de Comenzar:</text:h>
      <text:list text:continue-numbering="true" text:style-name="WWNum1">
        <text:list-item>
          <text:p text:style-name="P12"><text:span text:style-name="T6">Control de Orientación: </text:span><text:span text:style-name="T7">Cada marco incluye el logotipo de Blazing Goat grabado en el borde sureste. Al organizar, conectar o reorganizar el diseño, asegúrese de que este logotipo permanezca posicionado en el lado sureste. Esto es fundamental para mantener la orientación topográfica completamente exacta.</text:span></text:p>
        </text:list-item>
        <text:list-item>
          <text:p text:style-name="P12"><text:soft-page-break/><text:span text:style-name="T6">El Sistema Modular: </text:span><text:span text:style-name="T7">Se deben colgar/atornillar físicamente al menos dos piezas de la composición de 3 piezas en la pared para garantizar la estabilidad fundamental. La pieza restante se puede colocar y montar sin esfuerzo a su alrededor utilizando el Sistema Modular Magnético (MMS) integrado.</text:span></text:p>
        </text:list-item>
        <text:list-item>
          <text:p text:style-name="P12"><text:span text:style-name="T6">Elección de su Diseño: </text:span><text:span text:style-name="T7">Puede elegir cualesquiera dos piezas (o las tres) que desee colgar físicamente de su disposición.</text:span></text:p>
        </text:list-item>
        <text:list-item>
          <text:p text:style-name="P12"><text:span text:style-name="T6">Seguridad Opcional con Soportes (Altamente Recomendado): </text:span><text:span text:style-name="T7">Si desea que el sistema sea más seguro, puede utilizar los soportes rectos incluidos para unir las piezas de arte adyacentes entre sí. Utilice dos soportes para cada par de piezas conectadas para reforzar estructuralmente la unión.</text:span></text:p>
        </text:list-item>
      </text:list>
      <text:h text:style-name="P11" text:outline-level="3">Instrucciones Paso a Paso:</text:h>
      <text:p text:style-name="P13"><text:span text:style-name="T6">1. <text:s/>Planificar y Nivelar: </text:span><text:span text:style-name="T7">Coloque la plantilla de alineación en la pared en la ubicación deseada. Utilice un nivel de burbuja para asegurarse de que esté completamente derecha.</text:span></text:p>
      <text:p text:style-name="P13"><text:span text:style-name="T6">2. <text:s/>Vista Previa del Diseño: </text:span><text:span text:style-name="T7">Coloque temporalmente su Blaze Art contra la plantilla para verificar que la combinación y la disposición se vean exactamente como usted desea. Verifique dos veces que cada marco tenga su logotipo en el borde sureste para que el paisaje quede alineado correctamente.</text:span></text:p>
      <text:p text:style-name="P13"><text:span text:style-name="T6">3. <text:s/>Asegurar la Plantilla: </text:span><text:span text:style-name="T7">Una vez que esté satisfecho con la disposición, fije la plantilla a la pared con cinta adhesiva. Esta plantilla marca los contornos exactos donde se realizarán las perforaciones.</text:span></text:p>
      <text:p text:style-name="P13"><text:span text:style-name="T6">4. <text:s/>Fijar los Soportes Al Ras en el Arte: </text:span><text:span text:style-name="T7">Decida qué piezas va a colgar físicamente. Tome los tornillos más cortos y use su destornillador Phillips para fijar firmemente los soportes de montaje al ras directamente en la parte posterior de las piezas de arte elegidas. (Advertencia: No use tornillos largos en las piezas de arte, ya que causarán daños).</text:span></text:p>
      <text:p text:style-name="P13"><text:span text:style-name="T6">5. <text:s/>Preparar los Anclajes de Pared (Chazos): </text:span><text:span text:style-name="T7">Ubique las marcas de perforación en la plantilla pegada para las piezas que va a colgar. Con su taladro eléctrico, perfore agujeros en los puntos marcados de la pared. Introduzca los anclajes plásticos de pared en los agujeros recién perforados. Si es necesario, golpéelos suavemente hasta que queden completamente al ras con la superficie de la pared.</text:span></text:p>
      <text:p text:style-name="P13"><text:span text:style-name="T6">6. <text:s/>Montar en la Pared: </text:span><text:span text:style-name="T7">Alinee los tornillos más largos con los anclajes de pared instalados y atorníllelos con su destornillador Phillips, dejando expuesta solo una pequeña parte de la cabeza del tornillo para que encaje en el soporte al ras. Cuelgue firmemente sus piezas principales en estos tornillos.</text:span></text:p>
      <text:p text:style-name="P13"><text:span text:style-name="T6">7. <text:s/>Completar la Composición: </text:span><text:span text:style-name="T7">Conecte la pieza de arte restante alrededor de sus piezas ancladas utilizando el Sistema Modular Magnético (MMS), asegurándose de que todos los marcos mantengan la orientación correcta del logotipo. Si optó por utilizar los soportes rectos opcionales para mayor seguridad, fije los pares adyacentes entre sí ahora antes del montaje final. Verifique minuciosamente la estabilidad de todo el sistema.</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Tahoma"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lr-tb"/>
      <style:text-properties style:use-window-font-color="true" loext:opacity="0%" style:font-name="Cambria" fo:font-size="11pt" fo:language="en" fo:country="US" style:letter-kerning="false" style:font-name-asian="ＭＳ 明朝" style:font-size-asian="11pt" style:language-asian="en" style:country-asian="US" style:font-name-complex="Tahoma"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left" style:justify-single-word="false" fo:orphans="2" fo:widows="2" style:writing-mode="lr-tb"/>
      <style:text-properties fo:color="#333333" loext:opacity="100%" style:font-name="Arial" fo:font-family="Arial" style:font-family-generic="roman" style:font-pitch="variable" fo:font-size="11pt" style:font-size-asian="11pt"/>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139in" style:contextual-spacing="true" fo:text-indent="-0.25in"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3335in" fo:margin-bottom="0in"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Tahoma" style:font-family-complex="Tahoma"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Tahoma" style:font-family-complex="Tahoma"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Tahoma" style:font-family-complex="Tahoma"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Tahoma" style:font-family-complex="Tahoma"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Tahoma" style:font-family-complex="Tahoma"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Tahoma" style:font-family-complex="Tahoma"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Tahoma" style:font-family-complex="Tahoma"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in" fo:margin-bottom="0in" style:contextual-spacing="false" fo:line-height="100%" fo:text-align="left" style:justify-single-word="false" fo:orphans="2" fo:widows="2" style:writing-mode="lr-tb"/>
    </style:style>
    <style:style style:name="Title" style:family="paragraph" style:parent-style-name="Standard" style:next-style-name="Standard" loext:linked-style-name="Title_20_Char"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Tahoma" style:font-family-complex="Tahoma"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Tahoma" style:font-family-complex="Tahoma"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139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139in" style:contextual-spacing="true" fo:text-indent="-0.25in" style:auto-text-indent="false"/>
    </style:style>
    <style:style style:name="List_20_3_20__28_WW_29_" style:display-name="List 3 (WW)" style:family="paragraph" style:parent-style-name="Standard">
      <style:paragraph-properties fo:margin-left="0.75in" fo:margin-top="0in" fo:margin-bottom="0.139in" style:contextual-spacing="true" fo:text-indent="-0.25in" style:auto-text-indent="false"/>
    </style:style>
    <style:style style:name="List_20_1" style:display-name="List 1" style:family="paragraph" style:parent-style-name="Standard" style:list-style-name="WWNum1" style:class="list">
      <style:paragraph-properties fo:margin-top="0in" fo:margin-bottom="0.139in" style:contextual-spacing="true"/>
    </style:style>
    <style:style style:name="List_20_2" style:display-name="List 2" style:family="paragraph" style:parent-style-name="Standard" style:list-style-name="WWNum2" style:class="list">
      <style:paragraph-properties fo:margin-top="0in" fo:margin-bottom="0.139in" style:contextual-spacing="true"/>
    </style:style>
    <style:style style:name="List_20_3" style:display-name="List 3" style:family="paragraph" style:parent-style-name="Standard" style:list-style-name="WWNum3" style:class="list">
      <style:paragraph-properties fo:margin-top="0in" fo:margin-bottom="0.139in" style:contextual-spacing="true"/>
    </style:style>
    <style:style style:name="Numbering_20_1" style:display-name="Numbering 1" style:family="paragraph" style:parent-style-name="Standard" style:list-style-name="WWNum5" style:class="list">
      <style:paragraph-properties fo:margin-top="0in" fo:margin-bottom="0.139in" style:contextual-spacing="true"/>
    </style:style>
    <style:style style:name="Numbering_20_2" style:display-name="Numbering 2" style:family="paragraph" style:parent-style-name="Standard" style:list-style-name="WWNum6" style:class="list">
      <style:paragraph-properties fo:margin-top="0in" fo:margin-bottom="0.139in" style:contextual-spacing="true"/>
    </style:style>
    <style:style style:name="Numbering_20_3" style:display-name="Numbering 3" style:family="paragraph" style:parent-style-name="Standard" style:list-style-name="WWNum7" style:class="list">
      <style:paragraph-properties fo:margin-top="0in" fo:margin-bottom="0.139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lef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Table_20_Contents" style:display-name="Table Contents" style:family="paragraph" style:parent-style-name="Standard" style:class="extra">
      <style:paragraph-properties fo:orphans="0" fo:widows="0" text:number-lines="false" text:line-number="0"/>
    </style:style>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Tahoma" style:font-family-complex="Tahoma"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Tahoma" style:font-family-complex="Tahoma"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Tahoma" style:font-family-complex="Tahoma"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Tahoma" style:font-family-complex="Tahoma"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Tahoma" style:font-family-complex="Tahoma"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Tahoma" style:font-family-complex="Tahoma"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Tahoma" style:font-family-complex="Tahoma"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Tahoma" style:font-family-complex="Tahoma"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Tahoma" style:font-family-complex="Tahoma"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family-generic="roman"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family-generic="roman"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family-generic="roman"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initial-creator>python-docx</meta:initial-creator>
    <dc:description>generated by python-docx</dc:description>
    <meta:editing-cycles>4</meta:editing-cycles>
    <meta:creation-date>2013-12-23T23:15:00</meta:creation-date>
    <dc:date>2026-05-17T21:01:28.518911900</dc:date>
    <meta:editing-duration>PT19M30S</meta:editing-duration>
    <meta:generator>LibreOffice/26.2.3.2$Windows_X86_64 LibreOffice_project/70e089b17412e4cb7773e41413306b17a2328c34</meta:generator>
    <meta:document-statistic meta:table-count="2" meta:image-count="1" meta:object-count="0" meta:page-count="4" meta:paragraph-count="81" meta:word-count="1240" meta:character-count="7844" meta:non-whitespace-character-count="6686"/>
    <meta:user-defined meta:name="AppVersion">14.0000</meta:user-defined>
    <meta:template xlink:type="simple" xlink:actuate="onRequest" xlink:title="Normal.dotm" xlink:href=""/>
  </office:meta>
</office:document-meta>
</file>