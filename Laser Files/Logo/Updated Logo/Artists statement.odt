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1D0000021CCB12A65F.png" manifest:media-type="image/png"/>
  <manifest:file-entry manifest:full-path="Pictures/10000000000007300000068DB41D6186.jpg" manifest:media-type="image/jpeg"/>
  <manifest:file-entry manifest:full-path="Pictures/100000010000027800000092C04D3A9F.png" manifest:media-type="image/png"/>
  <manifest:file-entry manifest:full-path="Pictures/100000010000021F00000220FA1440A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721e"/>
    </style:style>
    <style:style style:name="P2" style:family="paragraph" style:parent-style-name="Standard">
      <style:paragraph-properties fo:text-align="center" style:justify-single-word="false"/>
      <style:text-properties officeooo:paragraph-rsid="000f721e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f721e" officeooo:paragraph-rsid="000f721e" style:font-weight-asian="bold" style:font-weight-complex="bold"/>
    </style:style>
    <style:style style:name="P4" style:family="paragraph" style:parent-style-name="Text_20_body">
      <style:paragraph-properties fo:text-align="left" style:justify-single-word="false"/>
      <style:text-properties style:font-name="Arial" fo:font-size="14pt" fo:font-weight="normal" officeooo:rsid="000f721e" officeooo:paragraph-rsid="000f721e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text-align="left" style:justify-single-word="false"/>
      <style:text-properties style:font-name="Arial" fo:font-size="10pt" fo:font-weight="normal" officeooo:rsid="000f721e" officeooo:paragraph-rsid="000f721e" style:font-size-asian="10pt" style:font-weight-asian="normal" style:font-size-complex="10pt" style:font-weight-complex="normal"/>
    </style:style>
    <style:style style:name="T1" style:family="text">
      <style:text-properties fo:font-size="24pt" fo:font-weight="bold" officeooo:rsid="0010b16d" style:font-size-asian="24pt" style:font-weight-asian="bold" style:font-size-complex="24pt" style:font-weight-complex="bold"/>
    </style:style>
    <style:style style:name="T2" style:family="text">
      <style:text-properties officeooo:rsid="0011de0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0b1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2.3193in" svg:y="-0.4508in" svg:width="2.2173in" svg:height="2.0209in" draw:z-index="0"><draw:image xlink:href="Pictures/10000000000007300000068DB41D6186.jpg" xlink:type="simple" xlink:show="embed" xlink:actuate="onLoad" draw:mime-type="image/jpeg"/></draw:frame><text:line-break/><text:line-break/><text:line-break/><text:line-break/><text:line-break/><text:line-break/><text:line-break/><text:line-break/></text:p>
      <text:p text:style-name="P2"><draw:frame draw:style-name="fr1" draw:name="Image4" text:anchor-type="char" svg:x="2.1429in" svg:y="0in" svg:width="2.639in" svg:height="0.6098in" draw:z-index="3"><draw:image xlink:href="Pictures/100000010000027800000092C04D3A9F.png" xlink:type="simple" xlink:show="embed" xlink:actuate="onLoad" draw:mime-type="image/png"/></draw:frame><text:span text:style-name="T1"/></text:p>
      <text:p text:style-name="P3"/>
      <text:p text:style-name="P4"/>
      <text:p text:style-name="P4">Meet the Artist: Harry.<text:line-break/>I am a Seattle-based artist, mountaineer, and endurance athlete on a mission to make your outdoor milestones tangible. Each piece is made with your <text:span text:style-name="T2">GPS</text:span> tracks, so you have exact memories of your adventure. </text:p>
      <text:p text:style-name="P4">Every great effort leaves a mark, whether it’s grinding through a grueling city marathon, hitting a rhythmic urban bike ride, or standing on a windswept summit. Topo Sculptures transform those raw <text:span text:style-name="T3">GPS coordinates or strava/alltrails</text:span> <text:span text:style-name="T3">trackings</text:span> into premium, three-dimensional physical artifacts.</text:p>
      <text:p text:style-name="P4">Using digital <text:span text:style-name="T2">artistry</text:span> and high-end craftsmanship, this collection captures the exact lines of local running routes, cycling loops, and iconic Northwest peaks. Because our adventures are always evolving, these pieces are entirely modular, <text:span text:style-name="T4">and can be rearranged using magnets,</text:span> allowing you to arrange, connect, and build a physical timeline of your athletic achievements.</text:p>
      <text:p text:style-name="P4">Every run, ride, and climb demands grit. These sculptures turn the lines on your fitness tracker into a lasting, tangible reminder of what you are capable of achieving.</text:p>
      <text:p text:style-name="P5"/>
      <text:p text:style-name="P5"><text:s text:c="5"/><text:span text:style-name="T4">Follow me on Instagram! @blazinggoat <text:s text:c="43"/>Visit my website! </text:span><text:a xlink:type="simple" xlink:href="http://www.blazinggoat.com/" text:style-name="Internet_20_link" text:visited-style-name="Visited_20_Internet_20_Link"><text:span text:style-name="T4">www.blazinggoat.com</text:span></text:a><text:span text:style-name="T4"><text:line-break/></text:span></text:p>
      <text:p text:style-name="P5"><draw:frame draw:style-name="fr1" draw:name="Image2" text:anchor-type="char" svg:x="0.3783in" svg:y="-0.0819in" svg:width="1.8827in" svg:height="1.8862in" draw:z-index="1"><draw:image xlink:href="Pictures/100000010000021F00000220FA1440A4.png" xlink:type="simple" xlink:show="embed" xlink:actuate="onLoad" draw:mime-type="image/png"/></draw:frame><draw:frame draw:style-name="fr1" draw:name="Image3" text:anchor-type="char" svg:x="4.5957in" svg:y="-0.0898in" svg:width="1.9035in" svg:height="1.9in" draw:z-index="2"><draw:image xlink:href="Pictures/100000010000021D0000021CCB12A6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cbded3" style:writing-mode="lr-tb" draw:fill="solid" draw:fill-color="#cbded3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cbded3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1T13:04:03.613701500</meta:creation-date>
    <dc:date>2026-05-21T13:28:05.036813500</dc:date>
    <meta:editing-duration>PT11M20S</meta:editing-duration>
    <meta:editing-cycles>3</meta:editing-cycles>
    <meta:generator>LibreOffice/26.2.3.2$Windows_X86_64 LibreOffice_project/70e089b17412e4cb7773e41413306b17a2328c34</meta:generator>
    <meta:document-statistic meta:table-count="0" meta:image-count="4" meta:object-count="0" meta:page-count="1" meta:paragraph-count="6" meta:word-count="169" meta:character-count="1193" meta:non-whitespace-character-count="971"/>
  </office:meta>
</office:document-meta>
</file>